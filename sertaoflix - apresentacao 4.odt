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600000054670EE91F7.png" manifest:media-type="image/png"/>
  <manifest:file-entry manifest:full-path="Pictures/1000000000000C2A000005DC7A216009.png" manifest:media-type="image/png"/>
  <manifest:file-entry manifest:full-path="Pictures/1000000000000291000003BD5647FD8F.png" manifest:media-type="image/png"/>
  <manifest:file-entry manifest:full-path="Pictures/100000010000052000000241B8143C9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57e0" officeooo:paragraph-rsid="000e57e0"/>
    </style:style>
    <style:style style:name="P2" style:family="paragraph" style:parent-style-name="Standard">
      <style:text-properties officeooo:paragraph-rsid="00121dbe"/>
    </style:style>
    <style:style style:name="P3" style:family="paragraph" style:parent-style-name="Text_20_body">
      <style:text-properties style:font-name="Liberation Serif"/>
    </style:style>
    <style:style style:name="P4" style:family="paragraph" style:parent-style-name="Text_20_body">
      <style:text-properties style:font-name="Liberation Serif" officeooo:rsid="000e97c0" officeooo:paragraph-rsid="000e97c0"/>
    </style:style>
    <style:style style:name="P5" style:family="paragraph" style:parent-style-name="Heading_20_2">
      <style:text-properties officeooo:rsid="00121dbe" officeooo:paragraph-rsid="00121dbe"/>
    </style:style>
    <style:style style:name="P6" style:family="paragraph" style:parent-style-name="Text_20_body">
      <style:text-properties officeooo:rsid="00121dbe" officeooo:paragraph-rsid="00121dbe"/>
    </style:style>
    <style:style style:name="P7" style:family="paragraph" style:parent-style-name="Heading_20_2">
      <style:text-properties officeooo:rsid="00121dbe" officeooo:paragraph-rsid="0012cfe1"/>
    </style:style>
    <style:style style:name="P8" style:family="paragraph" style:parent-style-name="Text_20_body">
      <style:text-properties officeooo:rsid="00121dbe" officeooo:paragraph-rsid="0012cfe1"/>
    </style:style>
    <style:style style:name="T1" style:family="text">
      <style:text-properties fo:font-family="'Liberation Serif'" style:font-family-generic="roman"/>
    </style:style>
    <style:style style:name="T2" style:family="text">
      <style:text-properties style:font-name="Liberation Serif"/>
    </style:style>
    <style:style style:name="T3" style:family="text">
      <style:text-properties officeooo:rsid="000c6074"/>
    </style:style>
    <style:style style:name="T4" style:family="text">
      <style:text-properties officeooo:rsid="00121dbe"/>
    </style:style>
    <style:style style:name="T5" style:family="text">
      <style:text-properties officeooo:rsid="0012cf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cardo augusto abdon santos</text:p>
      <text:p text:style-name="P1">Kauam Sobreira de Morais</text:p>
      <text:h text:style-name="Heading_20_2" text:outline-level="2"><text:a xlink:type="simple" xlink:href="https://www.kaggle.com/datasets/shivamb/netflix-shows" text:style-name="Internet_20_link" text:visited-style-name="Visited_20_Internet_20_Link"/></text:h>
      <text:h text:style-name="Heading_20_2" text:outline-level="2">1<text:span text:style-name="T1">ª</text:span><text:span text:style-name="T2"> entrega:</text:span></text:h>
      <text:p text:style-name="P1">O projeto é sobre os dados de uma franquia de cinema internacional, com informações sobre os clientes e seus funcionários. Buscamos e refinamos os datasets necessários para o início do projeto e começamos a criar o diagrama de como será a base de dados.</text:p>
      <text:p text:style-name="Standard"><text:a xlink:type="simple" xlink:href="https://www.kaggle.com/datasets/shivamb/netflix-shows" text:style-name="Internet_20_link" text:visited-style-name="Visited_20_Internet_20_Link"/></text:p>
      <text:p text:style-name="Standard"><text:a xlink:type="simple" xlink:href="https://www.kaggle.com/datasets/shivamb/netflix-shows" text:style-name="Internet_20_link" text:visited-style-name="Visited_20_Internet_20_Link">https://www.kaggle.com/datasets/shivamb/netflix-shows</text:a> <text:span text:style-name="T3">completo</text:span></text:p>
      <text:p text:style-name="Standard"><text:a xlink:type="simple" xlink:href="https://www.kaggle.com/datasets/harshitshankhdhar/imdb-dataset-of-top-1000-movies-and-tv-shows" text:style-name="Internet_20_link" text:visited-style-name="Visited_20_Internet_20_Link">https://www.kaggle.com/datasets/harshitshankhdhar/imdb-dataset-of-top-1000-movies-and-tv-shows</text:a> <text:span text:style-name="T3">completo</text:span></text:p>
      <text:p text:style-name="Standard"><text:a xlink:type="simple" xlink:href="https://www.kaggle.com/datasets/asaniczka/tmdb-movies-dataset-2023-930k-movies/discussion/531046" text:style-name="Internet_20_link" text:visited-style-name="Visited_20_Internet_20_Link">https://www.kaggle.com/datasets/asaniczka/tmdb-movies-dataset-2023-930k-movies/discussion/531046</text:a> <text:span text:style-name="T3">completo</text:span></text:p>
      <text:p text:style-name="Standard"/>
      <text:p text:style-name="P2"><text:a xlink:type="simple" xlink:href="http://kaggle.com/datasets/engrahsantariq/" text:style-name="Internet_20_link" text:visited-style-name="Visited_20_Internet_20_Link">http://kaggle.com/datasets/engrahsantariq/</text:a></text:p>
      <text:p text:style-name="P2"><text:a xlink:type="simple" xlink:href="http://kaggle.com/datasets/engrahsantariq/people-usa-random-dataset" text:style-name="Internet_20_link" text:visited-style-name="Visited_20_Internet_20_Link">people-usa-random-dataset</text:a> <text:span text:style-name="T3">base de clientes para o teatro, com adição de colunas extras especificas como nivel de cliente</text:span></text:p>
      <text:p text:style-name="Standard"><text:a xlink:type="simple" xlink:href="https://www.kaggle.com/datasets/tawfikelmetwally/employee-dataset" text:style-name="Internet_20_link" text:visited-style-name="Visited_20_Internet_20_Link">https://www.kaggle.com/datasets/tawfikelmetwally/employee-dataset</text:a> <text:span text:style-name="T3">funcionarios para os cinemas</text:span></text:p>
      <text:p text:style-name="Standard"><text:a xlink:type="simple" xlink:href="https://www.filmeb.com.br/database2/html/home1.php" text:style-name="Internet_20_link" text:visited-style-name="Visited_20_Internet_20_Link">https://www.filmeb.com.br/database2/html/home1.php</text:a> <text:span text:style-name="T3">base para nossos dados</text:span></text:p>
      <text:p text:style-name="Standard"/>
      <text:h text:style-name="Heading_20_2" text:outline-level="2"><text:span text:style-name="T1">2ª</text:span><text:span text:style-name="T2"> entrega:</text:span></text:h>
      <text:p text:style-name="P3"/>
      <text:p text:style-name="P4">Baixamos e refinamos os dados para somente a informações pertinentes, criamos a tabela de clientes e suas colunas específicas, criamos a tabela de cinemas.</text:p>
      <text:p text:style-name="P4">Ideia inicial para o <text:span text:style-name="T4">Modelo</text:span> de Classes</text:p>
      <text:p text:style-name="P4"><draw:frame draw:style-name="fr1" draw:name="Figura1" text:anchor-type="char" svg:x="0.302cm" svg:y="0.415cm" svg:width="17cm" svg:height="9.562cm" draw:z-index="0"><draw:image xlink:href="Pictures/10000000000009600000054670EE91F7.png" xlink:type="simple" xlink:show="embed" xlink:actuate="onLoad" draw:mime-type="image/png"/></draw:frame></text:p>
      <text:p text:style-name="P4"><text:soft-page-break/></text:p>
      <text:p text:style-name="P4"/>
      <text:p text:style-name="P4"/>
      <text:h text:style-name="P5" text:outline-level="2">3 entrega:</text:h>
      <text:p text:style-name="P6">Criação do DER, melhoria do MER e idealização dos triggers e constraints</text:p>
      <text:h text:style-name="P7" text:outline-level="2"><draw:frame draw:style-name="fr1" draw:name="Figura2" text:anchor-type="char" svg:x="-0.504cm" svg:y="-0.201cm" svg:width="17cm" svg:height="8.188cm" draw:z-index="1"><draw:image xlink:href="Pictures/1000000000000C2A000005DC7A216009.png" xlink:type="simple" xlink:show="embed" xlink:actuate="onLoad" draw:mime-type="image/png"/></draw:frame></text:h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h text:style-name="P7" text:outline-level="2" text:is-list-header="true"><text:span text:style-name="T5">4</text:span> entrega:</text:h>
      <text:p text:style-name="P8">Criação do DER, <text:span text:style-name="T5">incialização do banco de dados, web scraping para dados faltantes.</text:span></text:p>
      <text:p text:style-name="P8"><draw:frame draw:style-name="fr1" draw:name="Figura3" text:anchor-type="char" svg:x="0.228cm" svg:y="-0.102cm" svg:width="14.335cm" svg:height="17.993cm" draw:z-index="2"><draw:image xlink:href="Pictures/1000000000000291000003BD5647FD8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Figura6" text:anchor-type="char" svg:x="0.289cm" svg:y="0.194cm" svg:width="17cm" svg:height="7.475cm" draw:z-index="3"><draw:image xlink:href="Pictures/100000010000052000000241B8143C9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6T15:51:46.747178900</meta:creation-date>
    <dc:date>2026-05-18T17:09:04.623512900</dc:date>
    <meta:editing-duration>PT1H27M36S</meta:editing-duration>
    <meta:editing-cycles>4</meta:editing-cycles>
    <meta:generator>LibreOffice/26.2.2.2$Windows_X86_64 LibreOffice_project/1f77d10d6938fd34972958f64b2bcfa54f8b1ba5</meta:generator>
    <meta:document-statistic meta:table-count="0" meta:image-count="4" meta:object-count="0" meta:page-count="4" meta:paragraph-count="18" meta:word-count="150" meta:character-count="1293" meta:non-whitespace-character-count="1161"/>
  </office:meta>
</office:document-meta>
</file>